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3e4b" officeooo:paragraph-rsid="001f3e4b"/>
    </style:style>
    <style:style style:name="P2" style:family="paragraph" style:parent-style-name="Standard">
      <style:text-properties officeooo:rsid="001f40d8" officeooo:paragraph-rsid="001f40d8"/>
    </style:style>
    <style:style style:name="P3" style:family="paragraph" style:parent-style-name="Standard">
      <style:text-properties fo:font-weight="bold" officeooo:rsid="001f40d8" officeooo:paragraph-rsid="001f40d8" style:font-weight-asian="bold" style:font-weight-complex="bold"/>
    </style:style>
    <style:style style:name="P4" style:family="paragraph" style:parent-style-name="Standard">
      <style:text-properties fo:font-weight="bold" officeooo:rsid="0022198d" officeooo:paragraph-rsid="0022198d" style:font-weight-asian="bold" style:font-weight-complex="bold"/>
    </style:style>
    <style:style style:name="P5" style:family="paragraph" style:parent-style-name="Standard">
      <style:text-properties officeooo:rsid="001fc3fe" officeooo:paragraph-rsid="001fc3fe"/>
    </style:style>
    <style:style style:name="P6" style:family="paragraph" style:parent-style-name="Standard">
      <style:text-properties officeooo:rsid="00201ad0" officeooo:paragraph-rsid="00201ad0"/>
    </style:style>
    <style:style style:name="P7" style:family="paragraph" style:parent-style-name="Standard">
      <style:text-properties officeooo:rsid="0021e88a" officeooo:paragraph-rsid="0021e88a"/>
    </style:style>
    <style:style style:name="P8" style:family="paragraph" style:parent-style-name="Standard">
      <style:text-properties officeooo:rsid="0022198d" officeooo:paragraph-rsid="0022198d"/>
    </style:style>
    <style:style style:name="P9" style:family="paragraph" style:parent-style-name="Standard">
      <style:text-properties officeooo:rsid="00226ca6" officeooo:paragraph-rsid="00226ca6"/>
    </style:style>
    <style:style style:name="T1" style:family="text">
      <style:text-properties officeooo:rsid="001f40d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fc3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RR <text:s text:c="2"/>(Employee Risk Reduction) <text:line-break/><text:line-break/><text:line-break/>offline -&gt; online </text:p>
      <text:p text:style-name="P1"/>
      <text:p text:style-name="P1"/>
      <text:p text:style-name="P1"/>
      <text:p text:style-name="P1">1. who is complaning</text:p>
      <text:p text:style-name="P1"/>
      <text:p text:style-name="P1">hr,leadship, director , business()compnay </text:p>
      <text:p text:style-name="P1"/>
      <text:p text:style-name="P1">2. what is the problem </text:p>
      <text:p text:style-name="P1"><text:line-break/>risk is idefied very late </text:p>
      <text:p text:style-name="P1">rating </text:p>
      <text:p text:style-name="P1">cal </text:p>
      <text:p text:style-name="P1">visibility </text:p>
      <text:p text:style-name="P1"/>
      <text:p text:style-name="P1">3. people problem process problem <text:line-break/><text:line-break/>manager (no notification )<text:line-break/>director is not reviews <text:line-break/>standard methods<text:line-break/><text:line-break/><text:line-break/>pain points <text:line-break/><text:line-break/><text:span text:style-name="T1">risk is discorvered <text:line-break/>learders cannot act early <text:line-break/>no time</text:span></text:p>
      <text:p text:style-name="P1"><text:line-break/><text:line-break/><text:line-break/><text:span text:style-name="T1">sipoc <text:s text:c="2"/>(define stakeholders)</text:span></text:p>
      <text:p text:style-name="P1"/>
      <text:p text:style-name="P1"/>
      <text:p text:style-name="P1"/>
      <text:p text:style-name="P2">elements <text:s text:c="6"/>description</text:p>
      <text:p text:style-name="P2"/>
      <text:p text:style-name="P2">employee <text:s text:c="6"/>manager , director ,ceo</text:p>
      <text:p text:style-name="P2">input <text:s text:c="13"/>rating,feedback </text:p>
      <text:p text:style-name="P2">process <text:s text:c="12"/>caputre-&gt; cal-&gt; review <text:line-break/>deparment <text:s text:c="6"/>HR , managerment </text:p>
      <text:p text:style-name="P2">output <text:s text:c="15"/>risk scope </text:p>
      <text:p text:style-name="P2">risk employee list </text:p>
      <text:p text:style-name="P2"/>
      <text:p text:style-name="P2"/>
      <text:p text:style-name="P2"/>
      <text:p text:style-name="P2"/>
      <text:p text:style-name="P2"/>
      <text:p text:style-name="P2"/>
      <text:p text:style-name="P2"><text:s/></text:p>
      <text:p text:style-name="P3"><text:soft-page-break/>AS-IS PROCSSS</text:p>
      <text:p text:style-name="P2"/>
      <text:p text:style-name="P2"/>
      <text:p text:style-name="P2"><text:s/>Manger 1-1 metting</text:p>
      <text:p text:style-name="P2">-&gt;</text:p>
      <text:p text:style-name="P2">notes </text:p>
      <text:p text:style-name="P2">-&gt;</text:p>
      <text:p text:style-name="P2">given rating</text:p>
      <text:p text:style-name="P2">-&gt;</text:p>
      <text:p text:style-name="P2">risk cal </text:p>
      <text:p text:style-name="P2">-&gt;</text:p>
      <text:p text:style-name="P2">ouput in dashboard </text:p>
      <text:p text:style-name="P2"/>
      <text:p text:style-name="P2"/>
      <text:p text:style-name="P2"/>
      <text:p text:style-name="P2"><text:span text:style-name="T2">problems</text:span><text:line-break/>manual cal </text:p>
      <text:p text:style-name="P2">more time</text:p>
      <text:p text:style-name="P2">no dashbaord -&gt; </text:p>
      <text:p text:style-name="P2">no history </text:p>
      <text:p text:style-name="P2">no audit </text:p>
      <text:p text:style-name="P5">review</text:p>
      <text:p text:style-name="P5"/>
      <text:p text:style-name="P5"><text:line-break/>BRD AND FRD </text:p>
      <text:p text:style-name="P5"/>
      <text:p text:style-name="P5"><text:line-break/>vsm <text:line-break/></text:p>
      <text:p text:style-name="P5"><text:line-break/>table </text:p>
      <text:p text:style-name="P5"/>
      <text:p text:style-name="P5"/>
      <text:p text:style-name="P5">step <text:s text:c="5"/>time <text:s text:c="8"/></text:p>
      <text:p text:style-name="P5"/>
      <text:p text:style-name="P5">one -ne metting <text:s text:c="6"/>30min </text:p>
      <text:p text:style-name="P5">manual notes <text:s text:c="10"/>1hr </text:p>
      <text:p text:style-name="P5">system cal <text:s text:c="16"/>5 min </text:p>
      <text:p text:style-name="P5">approval delay <text:s text:c="12"/></text:p>
      <text:p text:style-name="P2"/>
      <text:p text:style-name="P2"><text:span text:style-name="T2">problems</text:span><text:line-break/>manual cal </text:p>
      <text:p text:style-name="P2">more time</text:p>
      <text:p text:style-name="P2">no dashbaord -&gt; </text:p>
      <text:p text:style-name="P2">no history </text:p>
      <text:p text:style-name="P2">no audit </text:p>
      <text:p text:style-name="P5"/>
      <text:p text:style-name="P5"/>
      <text:p text:style-name="P5">to-be</text:p>
      <text:p text:style-name="P5"/>
      <text:p text:style-name="P5"/>
      <text:p text:style-name="P5">manager logs in err</text:p>
      <text:p text:style-name="P5"><text:soft-page-break/>-&gt;</text:p>
      <text:p text:style-name="P5">manager 1-1</text:p>
      <text:p text:style-name="P5">-&gt;</text:p>
      <text:p text:style-name="P5">manger rating form </text:p>
      <text:p text:style-name="P5">-&gt;</text:p>
      <text:p text:style-name="P5">sys validate rating -&gt;</text:p>
      <text:p text:style-name="P5">sys cal</text:p>
      <text:p text:style-name="P5">-?&gt;</text:p>
      <text:p text:style-name="P5">dashbaord report <text:line-break/>-&gt; </text:p>
      <text:p text:style-name="P5">stakeholder review <text:s text:c="2"/></text:p>
      <text:p text:style-name="P5"/>
      <text:p text:style-name="P5"/>
      <text:p text:style-name="P5"/>
      <text:p text:style-name="P5">DFD </text:p>
      <text:p text:style-name="P5"/>
      <text:p text:style-name="P5">SHAPES </text:p>
      <text:p text:style-name="P5"/>
      <text:p text:style-name="P5">CIRCLE <text:s text:c="3"/>(PROCESS)</text:p>
      <text:p text:style-name="P5"/>
      <text:p text:style-name="P5">WORKS ON THE DATA </text:p>
      <text:p text:style-name="P5"/>
      <text:p text:style-name="P5"/>
      <text:p text:style-name="P5">RECTNAGE (ENTITY)</text:p>
      <text:p text:style-name="P5"/>
      <text:p text:style-name="P5">SEND THE DATA TO SYSTEM </text:p>
      <text:p text:style-name="P5">REEIVE THE DATA TO SYSTEM <text:tab/></text:p>
      <text:p text:style-name="P5"/>
      <text:p text:style-name="P5"/>
      <text:p text:style-name="P5">ERR</text:p>
      <text:p text:style-name="P5"/>
      <text:p text:style-name="P5">MANAGER <text:line-break/>HR <text:line-break/><text:line-break/>CUSTOMER </text:p>
      <text:p text:style-name="P5">VENDOR <text:line-break/></text:p>
      <text:p text:style-name="P5"/>
      <text:p text:style-name="P5"><text:line-break/><text:line-break/>OPEN RECTANGE </text:p>
      <text:p text:style-name="P2"/>
      <text:p text:style-name="P2"/>
      <text:p text:style-name="P2">--------------------</text:p>
      <text:p text:style-name="P2">---------------------</text:p>
      <text:p text:style-name="P2"/>
      <text:p text:style-name="P2"><text:line-break/><text:span text:style-name="T3">DATABASE (DATA STORE )</text:span></text:p>
      <text:p text:style-name="P2"/>
      <text:p text:style-name="P2"/>
      <text:p text:style-name="P5">ARROW <text:s/>-&gt; </text:p>
      <text:p text:style-name="P5"/>
      <text:p text:style-name="P5"><text:soft-page-break/>DATA MKOVEMENTS</text:p>
      <text:p text:style-name="P5"/>
      <text:p text:style-name="P5"/>
      <text:p text:style-name="P5">DATA NAME </text:p>
      <text:p text:style-name="P5"/>
      <text:p text:style-name="P5"/>
      <text:p text:style-name="P5"/>
      <text:p text:style-name="P6">DIAMOND </text:p>
      <text:p text:style-name="P6"/>
      <text:p text:style-name="P6"/>
      <text:p text:style-name="P6">DECISION </text:p>
      <text:p text:style-name="P6"/>
      <text:p text:style-name="P6"/>
      <text:p text:style-name="P6"/>
      <text:p text:style-name="P6"/>
      <text:p text:style-name="P7">DFD </text:p>
      <text:p text:style-name="P7"/>
      <text:p text:style-name="P7">LEVEL 0 LEVEL 1 </text:p>
      <text:p text:style-name="P7"/>
      <text:p text:style-name="P7">LEVEL 2 </text:p>
      <text:p text:style-name="P7"/>
      <text:p text:style-name="P7"/>
      <text:p text:style-name="P7"/>
      <text:p text:style-name="P7">SWIMLANE DIAGRAM <text:s text:c="2"/>(RESPONSIBILITY ) <text:s/></text:p>
      <text:p text:style-name="P7"/>
      <text:p text:style-name="P7"/>
      <text:p text:style-name="P7">MANAGER <text:s text:c="4"/>ENTER RATING </text:p>
      <text:p text:style-name="P7"/>
      <text:p text:style-name="P7"/>
      <text:p text:style-name="P7">SYSTEM <text:s text:c="5"/>VALIDATE </text:p>
      <text:p text:style-name="P7"/>
      <text:p text:style-name="P7">DIRECTOR <text:s text:c="4"/>REVIEW / APROVAL</text:p>
      <text:p text:style-name="P7"/>
      <text:p text:style-name="P7">HR <text:s text:c="14"/>EXECUTATION</text:p>
      <text:p text:style-name="P7"/>
      <text:p text:style-name="P7"/>
      <text:p text:style-name="P7"/>
      <text:p text:style-name="P7"/>
      <text:p text:style-name="P8">ERD <text:s text:c="3"/>(entity relationaship diagram)</text:p>
      <text:p text:style-name="P8"/>
      <text:p text:style-name="P8">one – one</text:p>
      <text:p text:style-name="P8">one – many </text:p>
      <text:p text:style-name="P8">many – one </text:p>
      <text:p text:style-name="P8">many – many </text:p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ERD </text:p>
      <text:p text:style-name="P8"/>
      <text:p text:style-name="P8"/>
      <text:p text:style-name="P8">RECTANGLE </text:p>
      <text:p text:style-name="P8"/>
      <text:p text:style-name="P8"><text:span text:style-name="T2">MANAGER</text:span> (e1) <text:s text:c="4"/>--------------GIVES ----------&gt; <text:s text:c="2"/>|| RATING (RATING ID , SCORE ,DATE ) </text:p>
      <text:p text:style-name="P8">(MANAGER ID , NAME )</text:p>
      <text:p text:style-name="P8"/>
      <text:p text:style-name="P8">-&gt; <text:s/>(RISK CALCULAION )</text:p>
      <text:p text:style-name="P8"/>
      <text:p text:style-name="P9">diamond</text:p>
      <text:p text:style-name="P8"><text:span text:style-name="T2">RISK</text:span> <text:s text:c="3"/>(relationship)</text:p>
      <text:p text:style-name="P8">RISK ID,RISK SCOPE ,RISK LEBVEL </text:p>
      <text:p text:style-name="P8"/>
      <text:p text:style-name="P8">-&gt; <text:s/>BELONG THIS </text:p>
      <text:p text:style-name="P8"/>
      <text:p text:style-name="P8"/>
      <text:p text:style-name="P4">RECTANGLE <text:s/>(e2) <text:s/></text:p>
      <text:p text:style-name="P8"/>
      <text:p text:style-name="P8">EMPLOYEE</text:p>
      <text:p text:style-name="P8">EMPLYEE ID ,NAME , ROLE </text:p>
      <text:p text:style-name="P8"/>
      <text:p text:style-name="P8"/>
      <text:p text:style-name="P8"/>
      <text:p text:style-name="P7"/>
      <text:p text:style-name="P7"/>
      <text:p text:style-name="P9">employee <text:s/>manager</text:p>
      <text:p text:style-name="P9">project -&gt; employee <text:s/></text:p>
      <text:p text:style-name="P7"/>
      <text:p text:style-name="P7"/>
      <text:p text:style-name="P7"/>
      <text:p text:style-name="P9">question <text:s text:c="3"/>-&gt; requirement</text:p>
      <text:p text:style-name="P9">sipoc <text:s text:c="2"/>define scope <text:s/>(entity)</text:p>
      <text:p text:style-name="P9">as-is <text:s/>shows prop <text:s/>(current )</text:p>
      <text:p text:style-name="P9">vsm <text:s/>shows waste </text:p>
      <text:p text:style-name="P9">tobe <text:s text:c="3"/>show solution (future)</text:p>
      <text:p text:style-name="P9">dfd (0,1) <text:s text:c="2"/>data movement </text:p>
      <text:p text:style-name="P9">swimlane <text:s text:c="3"/>responsibilities</text:p>
      <text:p text:style-name="P9">erd <text:s text:c="2"/>relationship 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31T15:36:52.056609409</meta:creation-date>
    <dc:date>2025-12-31T16:53:46.831960724</dc:date>
    <meta:editing-duration>PT52S</meta:editing-duration>
    <meta:editing-cycles>1</meta:editing-cycles>
    <meta:document-statistic meta:table-count="0" meta:image-count="0" meta:object-count="0" meta:page-count="5" meta:paragraph-count="112" meta:word-count="318" meta:character-count="2188" meta:non-whitespace-character-count="1690"/>
    <meta:generator>LibreOffice/7.3.7.2$Linux_X86_64 LibreOffice_project/30$Build-2</meta:generator>
  </office:meta>
</office:document-meta>
</file>